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a1" officeooo:paragraph-rsid="001246a1"/>
    </style:style>
    <style:style style:name="T1" style:family="text">
      <style:text-properties officeooo:rsid="0014d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pessoal <text:span text:style-name="T1">nov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5:21:49.515802856</meta:creation-date>
    <dc:date>2025-05-03T16:10:55.586965891</dc:date>
    <meta:editing-duration>PT1M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