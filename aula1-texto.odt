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6a1" officeooo:paragraph-rsid="00124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pesso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5:21:49.515802856</meta:creation-date>
    <dc:date>2025-05-03T15:22:28.816546731</dc:date>
    <meta:editing-duration>PT4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